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Arial" fo:language="es" fo:country="US" style:text-underline-style="solid" style:text-underline-width="auto" style:text-underline-color="font-color" fo:font-weight="bold" officeooo:paragraph-rsid="000f18d6" style:font-name-asian="Times New Roman" style:language-asian="es" style:country-asian="MX" style:font-weight-asian="bold" style:font-name-complex="Arial1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>
        <style:tab-stops>
          <style:tab-stop style:position="5.1772in"/>
        </style:tab-stops>
      </style:paragraph-properties>
      <style:text-properties officeooo:paragraph-rsid="000f18d6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00f18d6"/>
    </style:style>
    <style:style style:name="T1" style:family="text">
      <style:text-properties style:font-name="Arial" fo:language="pt" fo:country="BR" style:font-name-asian="Times New Roman" style:language-asian="es" style:country-asian="MX" style:font-name-complex="Arial1"/>
    </style:style>
    <style:style style:name="T2" style:family="text">
      <style:text-properties style:font-name="Arial" fo:language="es" fo:country="US" style:font-name-asian="Times New Roman" style:language-asian="es" style:country-asian="MX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HEISOKUDACHI <text:s text:c="21"/>PIES JUNTOS</text:span></text:p>
      <text:p text:style-name="P2" loext:marker-style-name="T1"><text:span text:style-name="T1">MUSUBIDACHI <text:s text:c="23"/>TALONES JUNTOS PUNTAS SEPARADAS</text:span></text:p>
      <text:p text:style-name="P2" loext:marker-style-name="T1"><text:span text:style-name="T1">UCHIHACHIJIDACHI <text:s text:c="15"/>VARIANTE DE HEIKO DACHI CON TALONES HACIA AFUERA <text:s text:c="12"/></text:span></text:p>
      <text:p text:style-name="P2" loext:marker-style-name="T1"><text:span text:style-name="T1">HEIKO DACHI <text:s text:c="25"/>PIES PARALELOS SEPARADOS AL ANCHO DE LOS HOMBROS</text:span></text:p>
      <text:p text:style-name="P3" loext:marker-style-name="T1"><text:span text:style-name="T1">SOTOASHIJIDACHI <text:s text:c="16"/>COMO HEIKO DACHI CON LAS PUNTAS DE LOS PIES HACIA AFUERA</text:span></text:p>
      <text:p text:style-name="P3" loext:marker-style-name="T1"><text:span text:style-name="T1">NAIFANCHIDACHI <text:s text:c="11"/>PIES PARALELOS CON TALONES HACIA AFUERA Y RODILLAS FLEXIONADAS</text:span></text:p>
      <text:p text:style-name="P3" loext:marker-style-name="T1"><text:span text:style-name="T1">SHIKODACHI <text:s text:c="20"/>POSICION BAJA, PIES ABIERTOS HACIA AFUERA Y RODILLAS FLEXIONADAS</text:span></text:p>
      <text:p text:style-name="P3" loext:marker-style-name="T1"><text:span text:style-name="T1">SENKUTSUDACHI <text:s text:c="18"/>UNA PIERNA AL FRENTE FELXIONADA Y LA OTRA ATRAS ESTIRADA</text:span></text:p>
      <text:p text:style-name="P3" loext:marker-style-name="T1"><text:span text:style-name="T1">KOKUTSUDACHI <text:s text:c="20"/>COMO SENKUTSUDACHI AL REVES</text:span></text:p>
      <text:p text:style-name="P3" loext:marker-style-name="T1"><text:span text:style-name="T1">OKUTSUDACHI <text:s text:c="23"/>VARIANTE DE KOKUTSUDACHI, MAS PROFUNDA</text:span></text:p>
      <text:p text:style-name="P3" loext:marker-style-name="T1"><text:span text:style-name="T1">NEKOASHIDACHI <text:s text:c="19"/>PESO EN LA PIERNA TRASERA, LA DELANTERA APENAS TOCA EL PISO</text:span></text:p>
      <text:p text:style-name="P3" loext:marker-style-name="T1"><text:span text:style-name="T1">KOSADACHI <text:s text:c="27"/>POSICION CRUZADA UNA PIERNA DELANTE DE LA OTRA </text:span></text:p>
      <text:p text:style-name="P3" loext:marker-style-name="T1"><text:span text:style-name="T1">SAGIDACHI <text:s text:c="29"/>PESO EN UNA PIERNA Y LA OTRA LEVANTADA (POSICION DE GRULLA)</text:span></text:p>
      <text:p text:style-name="P3" loext:marker-style-name="T1"><text:span text:style-name="T1">KIBADACHI <text:s text:c="29"/>POSICION DE JINETE</text:span></text:p>
      <text:p text:style-name="P3" loext:marker-style-name="T1"><text:span text:style-name="T1">IAIDACHI <text:s text:c="32"/>ARRODILLADO CON UNA PIERNA AL FRENTE <text:s/></text:span></text:p>
      <text:p text:style-name="P3" loext:marker-style-name="T1"><text:span text:style-name="T1">SANCHINDACHI <text:s text:c="21"/>PIES EN </text:span><text:span text:style-name="T2">ANGULO</text:span><text:span text:style-name="T1"> Y RODILLAS FLEXIONADAS</text:span></text:p>
      <text:p text:style-name="P3" loext:marker-style-name="T1"><text:span text:style-name="T1">SOCHINDACHI <text:s text:c="23"/>COMBINACION ENTRE SENKUTSUDACHI Y KIBADACHI</text:span></text:p>
      <text:p text:style-name="P3" loext:marker-style-name="T1"><text:span text:style-name="T1">AUMIRACHIDACHI <text:s text:c="17"/>UN PASO</text:span></text:p>
      <text:p text:style-name="P3" loext:marker-style-name="T1"><text:span text:style-name="T1">HANSENKUTSUDACHI <text:s text:c="10"/>COMO SENKUTSUDACHI PERO, MAS PEQUEÑO</text:span></text:p>
      <text:p text:style-name="P3" loext:marker-style-name="T1"><text:span text:style-name="T1">MOTODASHI <text:s text:c="26"/>COMO SENKUTSUDACHI, MAS PEQUEÑO Y AMBOS PIES VEN AL FRENTE</text:span></text:p>
      <text:p text:style-name="P3" loext:marker-style-name="T2"><text:span text:style-name="T2">BENSOCUDASHI <text:s text:c="20"/>COMO KOSADACHI DE LADO</text:span></text:p>
      <text:p text:style-name="P3" loext:marker-style-name="T2"><text:span text:style-name="T2">T-DASHI <text:s text:c="35"/>POSICION DE T CON LOS PIES</text:span></text:p>
      <text:p text:style-name="P3" loext:marker-style-name="T2"><text:span text:style-name="T2">LENOJIDASHI <text:s text:c="26"/>COMO T-DACHI CON LOS PIES SEPARADOS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17:42:52.923848450</meta:creation-date>
    <dc:date>2026-05-12T18:12:14.766209918</dc:date>
    <meta:editing-duration>PT19M10S</meta:editing-duration>
    <meta:editing-cycles>1</meta:editing-cycles>
    <meta:document-statistic meta:table-count="0" meta:image-count="0" meta:object-count="0" meta:page-count="1" meta:paragraph-count="23" meta:word-count="177" meta:character-count="1733" meta:non-whitespace-character-count="1057"/>
    <meta:generator>LibreOffice/24.2.7.2$Linux_X86_64 LibreOffice_project/420$Build-2</meta:generator>
  </office:meta>
</office:document-meta>
</file>